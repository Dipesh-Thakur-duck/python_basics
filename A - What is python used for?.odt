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0ace7" officeooo:paragraph-rsid="0010ac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 is python used for?</text:h>
      <text:p text:style-name="Text_20_body">Python is one of the most versatile programming languages out there. Here's what it can be used for, with everything explained plainly:</text:p>
      <text:h text:style-name="Heading_20_2" text:outline-level="2">Web Development (Building Websites)</text:h>
      <text:p text:style-name="Text_20_body">Python can power the <text:span text:style-name="Strong_20_Emphasis">backend</text:span> of a website — meaning the part you <text:span text:style-name="Emphasis">don't see</text:span>. When you visit a website, there's a visible side (buttons, images, layout) and a hidden side that handles your login, fetches your data from a database, and sends back the right page. Python handles that hidden side using frameworks like Django and Flask.</text:p>
      <text:p text:style-name="Text_20_body"><text:span text:style-name="Strong_20_Emphasis">Example:</text:span> When you log into Facebook and it shows <text:span text:style-name="Emphasis">your</text:span> profile and <text:span text:style-name="Emphasis">your</text:span> friends — that logic of "fetch this person's data and serve it to them" is backend work.</text:p>
      <text:h text:style-name="Heading_20_2" text:outline-level="2">Data Analysis</text:h>
      <text:p text:style-name="Text_20_body">Python is widely used to look through large amounts of data and find patterns or answers. Libraries like <text:span text:style-name="Strong_20_Emphasis">Pandas</text:span> and <text:span text:style-name="Strong_20_Emphasis">NumPy</text:span> let you load a spreadsheet with thousands of rows and answer questions like "which product sold the most in March?"</text:p>
      <text:p text:style-name="Text_20_body"><text:span text:style-name="Strong_20_Emphasis">Example:</text:span> A shop owner has 3 years of sales records. Python can read all of it and tell them which month was always the slowest.</text:p>
      <text:h text:style-name="Heading_20_2" text:outline-level="2">Machine Learning and AI</text:h>
      <text:p text:style-name="Text_20_body">Python is the main language used to build AI systems — things that can recognize images, translate text, recommend movies, or detect fraud. Libraries like <text:span text:style-name="Strong_20_Emphasis">TensorFlow</text:span> and <text:span text:style-name="Strong_20_Emphasis">scikit-learn</text:span> make this possible.</text:p>
      <text:p text:style-name="Text_20_body"><text:span text:style-name="Strong_20_Emphasis">Example:</text:span> Netflix recommending a show you'll probably like is powered by this kind of system.</text:p>
      <text:h text:style-name="Heading_20_2" text:outline-level="2">Automation (Doing Repetitive Tasks For You)</text:h>
      <text:p text:style-name="Text_20_body">If you do the same thing on your computer every day — like downloading a file, renaming 200 photos, filling a form, or copying data from one place to another — Python can do it for you automatically.</text:p>
      <text:p text:style-name="Text_20_body"><text:span text:style-name="Strong_20_Emphasis">Example:</text:span> Instead of manually downloading 100 invoices from a website one by one, you write a Python script and it does all 100 in seconds while you drink tea.</text:p>
      <text:h text:style-name="Heading_20_2" text:outline-level="2">Big Data Processing</text:h>
      <text:p text:style-name="Text_20_body"><text:span text:style-name="Strong_20_Emphasis">Big data</text:span> just means data so massive that a normal spreadsheet can't handle it — we're talking millions or billions of rows. Think of all the tweets posted in a single day, or every transaction made across all banks worldwide. Python works with tools like Apache Spark to process this scale of data.</text:p>
      <text:p text:style-name="Text_20_body"><text:soft-page-break/><text:span text:style-name="Strong_20_Emphasis">Example:</text:span> A telecom company wants to know which city had the most call drops last month across 50 million calls. That's big data — Python helps crunch it.</text:p>
      <text:h text:style-name="Heading_20_2" text:outline-level="2">Prototyping</text:h>
      <text:p text:style-name="Text_20_body"><text:span text:style-name="Strong_20_Emphasis">Prototyping</text:span> means building a quick, rough version of something just to test if the idea works — before investing time in building it properly. Python is great for this because you can write it fast without a lot of setup.</text:p>
      <text:p text:style-name="Text_20_body"><text:span text:style-name="Strong_20_Emphasis">Example:</text:span> You have an idea for an app that scans a receipt and calculates how much each person owes. Before building the full app, you write a rough Python script in an afternoon to see if the core idea even works. That rough version is the prototype.</text:p>
      <text:h text:style-name="Heading_20_2" text:outline-level="2">Managing Workflows (Pipelines)</text:h>
      <text:p text:style-name="Text_20_body"><text:span text:style-name="Strong_20_Emphasis">Managing workflows</text:span> means controlling a sequence of tasks that need to happen in order, automatically. In tech, this is called a <text:span text:style-name="Strong_20_Emphasis">pipeline</text:span> — data or tasks flow from one step to the next like an assembly line.</text:p>
      <text:p text:style-name="Text_20_body"><text:span text:style-name="Strong_20_Emphasis">Example:</text:span> Every night at midnight, a hospital system needs to: pull new patient records → clean the data → run a report → email it to doctors. Python can orchestrate all four steps in sequence, automatically, without anyone pressing a button.</text:p>
      <text:h text:style-name="Heading_20_2" text:outline-level="2">Scientific Research</text:h>
      <text:p text:style-name="Text_20_body">Physicists, biologists, economists, and other researchers use Python to run simulations, process experimental data, and visualize results. Libraries like <text:span text:style-name="Strong_20_Emphasis">Matplotlib</text:span> let you turn raw numbers into charts and graphs.</text:p>
      <text:p text:style-name="Text_20_body"><text:span text:style-name="Strong_20_Emphasis">Example:</text:span> A climate scientist has temperature readings from 500 weather stations over 30 years. Python helps them plot it all and spot the warming trend visually.</text:p>
      <text:h text:style-name="Heading_20_2" text:outline-level="2">Game Development</text:h>
      <text:p text:style-name="Text_20_body">Python can be used to build simple 2D games using a library called <text:span text:style-name="Strong_20_Emphasis">Pygame</text:span>. It's not used for big commercial games, but it's great for indie projects or learning.</text:p>
      <text:h text:style-name="Heading_20_2" text:outline-level="2">Why Python Specifically?</text:h>
      <text:p text:style-name="Text_20_body">The reason Python is used for all of the above is that its syntax (the way you write it) reads almost like plain English, making it fast to write and easy to understand. A task that might take 50 lines in another language might take 10 in Python. That speed and readability is why it became the go-to language across so many different field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30T11:46:10.192359860</meta:creation-date>
    <dc:date>2026-05-30T11:47:17.569107569</dc:date>
    <meta:editing-duration>PT1M8S</meta:editing-duration>
    <meta:editing-cycles>1</meta:editing-cycles>
    <meta:document-statistic meta:table-count="0" meta:image-count="0" meta:object-count="0" meta:page-count="2" meta:paragraph-count="30" meta:word-count="709" meta:character-count="4143" meta:non-whitespace-character-count="3455"/>
    <meta:generator>LibreOffice/24.2.7.2$Linux_X86_64 LibreOffice_project/420$Build-2</meta:generator>
  </office:meta>
</office:document-meta>
</file>