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7681in"/>
    </style:style>
    <style:style style:name="Table1.C" style:family="table-column">
      <style:table-column-properties style:column-width="1.7438in"/>
    </style:style>
    <style:style style:name="Table1.D" style:family="table-column">
      <style:table-column-properties style:column-width="2.056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officeooo:paragraph-rsid="00100c00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T1" style:family="text">
      <style:text-properties officeooo:rsid="0011ee1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plete Python Setup Guide</text:h>
      <text:h text:style-name="Heading_20_1" text:outline-level="1">PART 1: Plain Python Setup</text:h>
      <text:h text:style-name="Heading_20_2" text:outline-level="2">Step 1 — Install Python (The Interpreter)</text:h>
      <text:p text:style-name="Text_20_body">Before writing any code, you need to install Python itself. The <text:span text:style-name="Strong_20_Emphasis">interpreter</text:span> is the program that reads your Python code and actually runs it — without it, your computer has no idea what Python code means.</text:p>
      <text:h text:style-name="Heading_20_3" text:outline-level="3">Windows</text:h>
      <text:list text:style-name="L1">
        <text:list-item>
          <text:p text:style-name="P4">Go to <text:span text:style-name="Strong_20_Emphasis">https://python.org/downloads</text:span> </text:p>
        </text:list-item>
        <text:list-item>
          <text:p text:style-name="P4">Click the big yellow <text:span text:style-name="Strong_20_Emphasis">"Download Python 3.x.x"</text:span> button </text:p>
        </text:list-item>
        <text:list-item>
          <text:p text:style-name="P4">Run the downloaded <text:span text:style-name="Source_20_Text">.exe</text:span> file </text:p>
        </text:list-item>
        <text:list-item>
          <text:p text:style-name="P4"><text:span text:style-name="Strong_20_Emphasis">IMPORTANT</text:span> — on the very first screen of the installer, check the box that says <text:span text:style-name="Strong_20_Emphasis">"Add Python to PATH"</text:span> before clicking Install. If you miss this, Python won't work from the terminal. </text:p>
        </text:list-item>
        <text:list-item>
          <text:p text:style-name="P3">Click <text:span text:style-name="Strong_20_Emphasis">"Install Now"</text:span> </text:p>
        </text:list-item>
      </text:list>
      <text:p text:style-name="Text_20_body"><text:span text:style-name="Strong_20_Emphasis">Verify it worked</text:span> — open Command Prompt (search "cmd" in Start) and type:</text:p>
      <text:p text:style-name="P2"><text:span text:style-name="Source_20_Text">python --version</text:span></text:p>
      <text:p text:style-name="Text_20_body">You should see something like <text:span text:style-name="Source_20_Text">Python 3.12.0</text:span></text:p>
      <text:h text:style-name="Heading_20_3" text:outline-level="3">macOS</text:h>
      <text:p text:style-name="Text_20_body">macOS comes with an old Python 2 pre-installed, but you need Python 3. Best way is via <text:span text:style-name="Strong_20_Emphasis">Homebrew</text:span> (a package manager for Mac).</text:p>
      <text:p text:style-name="Text_20_body"><text:span text:style-name="Strong_20_Emphasis">First, install Homebrew</text:span> — open Terminal and paste:</text:p>
      <text:p text:style-name="P2"><text:span text:style-name="Source_20_Text">/bin/bash -c "$(curl -fsSL https://raw.githubusercontent.com/Homebrew/install/HEAD/install.sh)"</text:span></text:p>
      <text:p text:style-name="Text_20_body"><text:span text:style-name="Strong_20_Emphasis">Then install Python:</text:span></text:p>
      <text:p text:style-name="P2"><text:span text:style-name="Source_20_Text">brew install python</text:span></text:p>
      <text:p text:style-name="Text_20_body"><text:span text:style-name="Strong_20_Emphasis">Verify it worked:</text:span></text:p>
      <text:p text:style-name="P2"><text:span text:style-name="Source_20_Text">python3 --version</text:span></text:p>
      <text:p text:style-name="Quotations">On Mac you'll type <text:span text:style-name="Source_20_Text">python3</text:span> instead of <text:span text:style-name="Source_20_Text">python</text:span> — this is normal.</text:p>
      <text:h text:style-name="Heading_20_3" text:outline-level="3">Linux (Ubuntu/Debian)</text:h>
      <text:p text:style-name="Text_20_body">Python usually comes pre-installed on Linux. Check first:</text:p>
      <text:p text:style-name="P2"><text:span text:style-name="Source_20_Text">python3 --version</text:span></text:p>
      <text:p text:style-name="Text_20_body"><text:soft-page-break/>If it's not installed or you want the latest version:</text:p>
      <text:p text:style-name="Preformatted_20_Text"><text:span text:style-name="Source_20_Text">sudo apt update</text:span></text:p>
      <text:p text:style-name="P2"><text:span text:style-name="Source_20_Text">sudo apt install python3</text:span></text:p>
      <text:p text:style-name="Text_20_body">Install pip (Python's package installer) too:</text:p>
      <text:p text:style-name="P2"><text:span text:style-name="Source_20_Text">sudo apt install python3-pip</text:span></text:p>
      <text:h text:style-name="Heading_20_2" text:outline-level="2">Step 2 — Install VS Code</text:h>
      <text:p text:style-name="Text_20_body">VS Code is the editor where you actually write your code. Think of Python as the engine and VS Code as the cockpit.</text:p>
      <text:h text:style-name="Heading_20_3" text:outline-level="3">Windows</text:h>
      <text:list text:style-name="L2">
        <text:list-item>
          <text:p text:style-name="P6">Go to <text:span text:style-name="Strong_20_Emphasis">https://code.visualstudio.com</text:span> </text:p>
        </text:list-item>
        <text:list-item>
          <text:p text:style-name="P6">Click <text:span text:style-name="Strong_20_Emphasis">Download for Windows</text:span> </text:p>
        </text:list-item>
        <text:list-item>
          <text:p text:style-name="P6">Run the installer </text:p>
        </text:list-item>
        <text:list-item>
          <text:p text:style-name="P6">During installation, check both: </text:p>
          <text:list>
            <text:list-item>
              <text:p text:style-name="P6"><text:span text:style-name="Strong_20_Emphasis">"Add to PATH"</text:span> </text:p>
            </text:list-item>
            <text:list-item>
              <text:p text:style-name="P6"><text:span text:style-name="Strong_20_Emphasis">"Add Open with Code to context menu"</text:span> (lets you right-click any folder and open it in VS Code) </text:p>
            </text:list-item>
          </text:list>
        </text:list-item>
        <text:list-item>
          <text:p text:style-name="P5">Finish and launch VS Code </text:p>
        </text:list-item>
      </text:list>
      <text:h text:style-name="Heading_20_3" text:outline-level="3">macOS</text:h>
      <text:list text:style-name="L3">
        <text:list-item>
          <text:p text:style-name="P8">Go to <text:span text:style-name="Strong_20_Emphasis">https://code.visualstudio.com</text:span> </text:p>
        </text:list-item>
        <text:list-item>
          <text:p text:style-name="P8">Click <text:span text:style-name="Strong_20_Emphasis">Download for Mac</text:span> </text:p>
        </text:list-item>
        <text:list-item>
          <text:p text:style-name="P8">Open the downloaded <text:span text:style-name="Source_20_Text">.zip</text:span> — it extracts a <text:span text:style-name="Source_20_Text">Visual Studio Code.app</text:span> file </text:p>
        </text:list-item>
        <text:list-item>
          <text:p text:style-name="P8">Drag that file into your <text:span text:style-name="Strong_20_Emphasis">Applications</text:span> folder </text:p>
        </text:list-item>
        <text:list-item>
          <text:p text:style-name="P7">Open VS Code from Applications </text:p>
        </text:list-item>
      </text:list>
      <text:p text:style-name="Text_20_body"><text:span text:style-name="Strong_20_Emphasis">Optional but recommended</text:span> — open VS Code, press <text:span text:style-name="Source_20_Text">Cmd+Shift+P</text:span>, type <text:span text:style-name="Source_20_Text">shell command</text:span>, and select <text:span text:style-name="Strong_20_Emphasis">"Install 'code' command in PATH"</text:span>. This lets you open any folder in VS Code by typing <text:span text:style-name="Source_20_Text">code .</text:span> in the terminal.</text:p>
      <text:h text:style-name="Heading_20_3" text:outline-level="3">Linux (Ubuntu/Debian)</text:h>
      <text:p text:style-name="Preformatted_20_Text"><text:span text:style-name="Source_20_Text">sudo apt update</text:span></text:p>
      <text:p text:style-name="Preformatted_20_Text"><text:span text:style-name="Source_20_Text">sudo apt install wget gpg</text:span></text:p>
      <text:p text:style-name="Preformatted_20_Text"><text:span text:style-name="Source_20_Text">wget -qO- https://packages.microsoft.com/keys/microsoft.asc | gpg --dearmor &gt; packages.microsoft.gpg</text:span></text:p>
      <text:p text:style-name="Preformatted_20_Text"><text:span text:style-name="Source_20_Text">sudo install -o root -g root -m 644 packages.microsoft.gpg /usr/share/keyrings/</text:span></text:p>
      <text:p text:style-name="Preformatted_20_Text"><text:span text:style-name="Source_20_Text">sudo sh -c 'echo "deb [arch=amd64 signed-by=/usr/share/keyrings/packages.microsoft.gpg] https://packages.microsoft.com/repos/code stable main" &gt; /etc/apt/sources.list.d/vscode.list'</text:span></text:p>
      <text:p text:style-name="Preformatted_20_Text"><text:span text:style-name="Source_20_Text">sudo apt update</text:span></text:p>
      <text:p text:style-name="P2"><text:span text:style-name="Source_20_Text">sudo apt install code</text:span></text:p>
      <text:p text:style-name="Text_20_body">Or simply go to <text:span text:style-name="Strong_20_Emphasis">https://code.visualstudio.com</text:span>, download the <text:span text:style-name="Source_20_Text">.deb</text:span> file, and double-click it to install.</text:p>
      <text:h text:style-name="Heading_20_2" text:outline-level="2"><text:soft-page-break/>Step 3 — Install the Python Extension in VS Code</text:h>
      <text:p text:style-name="Text_20_body">VS Code on its own doesn't know about Python — you need to add the official Python extension made by Microsoft.</text:p>
      <text:list text:style-name="L4">
        <text:list-item>
          <text:p text:style-name="P10">Open VS Code </text:p>
        </text:list-item>
        <text:list-item>
          <text:p text:style-name="P10">Click the <text:span text:style-name="Strong_20_Emphasis">Extensions icon</text:span> on the left sidebar (it looks like four squares) </text:p>
        </text:list-item>
        <text:list-item>
          <text:p text:style-name="P10">Search <text:span text:style-name="Strong_20_Emphasis">"Python"</text:span> </text:p>
        </text:list-item>
        <text:list-item>
          <text:p text:style-name="P9">Install the one by <text:span text:style-name="Strong_20_Emphasis">Microsoft</text:span> (it's the top result with millions of downloads) </text:p>
        </text:list-item>
      </text:list>
      <text:p text:style-name="Text_20_body">This gives you syntax highlighting (color-coded code), error detection, and the ability to run Python files directly in VS Code.</text:p>
      <text:h text:style-name="Heading_20_2" text:outline-level="2">Step 4 — Write and Run Your First Python File</text:h>
      <text:list text:style-name="L5">
        <text:list-item>
          <text:p text:style-name="P12">Open VS Code </text:p>
        </text:list-item>
        <text:list-item>
          <text:p text:style-name="P12">Go to <text:span text:style-name="Strong_20_Emphasis">File → Open Folder</text:span> and open or create a folder for your project </text:p>
        </text:list-item>
        <text:list-item>
          <text:p text:style-name="P12">Create a new file — name it <text:span text:style-name="Source_20_Text">hello.py</text:span> (the <text:span text:style-name="Source_20_Text">.py</text:span> extension tells VS Code it's Python) </text:p>
        </text:list-item>
        <text:list-item>
          <text:p text:style-name="P11">Type: </text:p>
        </text:list-item>
      </text:list>
      <text:p text:style-name="P2"><text:span text:style-name="Source_20_Text">print("Hello, world!")</text:span></text:p>
      <text:list text:style-name="L6">
        <text:list-item>
          <text:p text:style-name="P13">Right-click anywhere in the file and select <text:span text:style-name="Strong_20_Emphasis">"Run Python File in Terminal"</text:span> </text:p>
        </text:list-item>
      </text:list>
      <text:p text:style-name="Text_20_body">You should see <text:span text:style-name="Source_20_Text">Hello, world!</text:span> printed at the bottom in the terminal panel.</text:p>
      <text:h text:style-name="Heading_20_2" text:outline-level="2">Step 5 — Select the Right Python Interpreter in VS Code</text:h>
      <text:p text:style-name="Text_20_body">Sometimes VS Code picks the wrong Python version (especially on Mac/Linux where multiple versions exist).</text:p>
      <text:list text:style-name="L7">
        <text:list-item>
          <text:p text:style-name="P15">Press <text:span text:style-name="Source_20_Text">Ctrl+Shift+P</text:span> (or <text:span text:style-name="Source_20_Text">Cmd+Shift+P</text:span> on Mac) </text:p>
        </text:list-item>
        <text:list-item>
          <text:p text:style-name="P15">Type <text:span text:style-name="Strong_20_Emphasis">"Python: Select Interpreter"</text:span> </text:p>
        </text:list-item>
        <text:list-item>
          <text:p text:style-name="P14">Choose the Python version you installed (look for the one with your version number) </text:p>
          <text:p text:style-name="P14"/>
        </text:list-item>
      </text:list>
      <text:p text:style-name="Horizontal_20_Line"/>
      <text:p text:style-name="Text_20_body"/>
      <text:h text:style-name="P1" text:outline-level="1">PART 2: Jupyter Notebook (.ipynb) Setup in VS Code</text:h>
      <text:h text:style-name="Heading_20_2" text:outline-level="2">What is a Jupyter Notebook?</text:h>
      <text:p text:style-name="Text_20_body">A regular <text:span text:style-name="Source_20_Text">.py</text:span> file runs all at once from top to bottom. A <text:span text:style-name="Strong_20_Emphasis">Jupyter Notebook</text:span> (<text:span text:style-name="Source_20_Text">.ipynb</text:span> file) is different — it's divided into <text:span text:style-name="Strong_20_Emphasis">cells</text:span>, and you run each cell one at a time. This is incredibly useful when:</text:p>
      <text:list text:style-name="L8">
        <text:list-item>
          <text:p text:style-name="P17"><text:soft-page-break/>You're learning and want to test small pieces of code independently </text:p>
        </text:list-item>
        <text:list-item>
          <text:p text:style-name="P17">You're analyzing data and want to see results step by step </text:p>
        </text:list-item>
        <text:list-item>
          <text:p text:style-name="P16">You want your code and its output (including charts) to live in the same document </text:p>
        </text:list-item>
      </text:list>
      <text:p text:style-name="Text_20_body"><text:span text:style-name="Source_20_Text">.ipynb</text:span> stands for <text:span text:style-name="Strong_20_Emphasis">IPython Notebook</text:span> — the original name before it became Jupyter.</text:p>
      <text:h text:style-name="Heading_20_2" text:outline-level="2">Step 1 — Install the Jupyter Extension in VS Code <text:span text:style-name="T1">and Created Virtual Environment</text:span></text:h>
      <text:h text:style-name="Heading_20_3" text:outline-level="3">All Operating Systems (Windows, Mac, Linux)</text:h>
      <text:list text:style-name="L9">
        <text:list-item>
          <text:p text:style-name="P19">Open VS Code </text:p>
        </text:list-item>
        <text:list-item>
          <text:p text:style-name="P19">Click the <text:span text:style-name="Strong_20_Emphasis">Extensions icon</text:span> on the left sidebar </text:p>
        </text:list-item>
        <text:list-item>
          <text:p text:style-name="P19">Search <text:span text:style-name="Strong_20_Emphasis">"Jupyter"</text:span> </text:p>
        </text:list-item>
        <text:list-item>
          <text:p text:style-name="P18">Install the one by <text:span text:style-name="Strong_20_Emphasis">Microsoft</text:span> </text:p>
        </text:list-item>
      </text:list>
      <text:p text:style-name="Text_20_body">This is the only extension you need — it handles everything inside VS Code.</text:p>
      <text:h text:style-name="Heading_20_3" text:outline-level="3">Creating and Activating a Virtual Environment</text:h>
      <text:h text:style-name="Heading_20_3" text:outline-level="3">Windows</text:h>
      <text:p text:style-name="Preformatted_20_Text"><text:span text:style-name="Source_20_Text">python -m venv .venv</text:span></text:p>
      <text:p text:style-name="P2"><text:span text:style-name="Source_20_Text">.venv\Scripts\activate</text:span></text:p>
      <text:h text:style-name="Heading_20_3" text:outline-level="3">Mac</text:h>
      <text:p text:style-name="Preformatted_20_Text"><text:span text:style-name="Source_20_Text">python3 -m venv .venv</text:span></text:p>
      <text:p text:style-name="P2"><text:span text:style-name="Source_20_Text">source .venv/bin/activate</text:span></text:p>
      <text:h text:style-name="Heading_20_3" text:outline-level="3">Linux</text:h>
      <text:p text:style-name="Preformatted_20_Text"><text:span text:style-name="Source_20_Text">python3 -m venv .venv</text:span></text:p>
      <text:p text:style-name="P2"><text:span text:style-name="Source_20_Text">source .venv/bin/activate</text:span></text:p>
      <text:p text:style-name="Text_20_body">You'll know it worked when <text:span text:style-name="Source_20_Text">(.venv)</text:span> appears at the front of your terminal prompt:</text:p>
      <text:p text:style-name="Preformatted_20_Text"><text:span text:style-name="Source_20_Text"># Windows</text:span></text:p>
      <text:p text:style-name="Preformatted_20_Text"><text:span text:style-name="Source_20_Text">(.venv) C:\Users\YourName\Documents\python_basics&gt;</text:span></text:p>
      <text:p text:style-name="Preformatted_20_Text"/>
      <text:p text:style-name="Preformatted_20_Text"><text:span text:style-name="Source_20_Text"># Mac / Linux</text:span></text:p>
      <text:p text:style-name="P2"><text:span text:style-name="Source_20_Text">(.venv) dipesh-thakur@ubuntu:~/Documents/python_basics$</text:span></text:p>
      <text:p text:style-name="Text_20_body"/>
      <text:h text:style-name="Heading_20_2" text:outline-level="2">Step 2 — Install Jupyter in Python</text:h>
      <text:p text:style-name="Text_20_body">The extension alone isn't enough — you also need the actual Jupyter package installed in Python itself.</text:p>
      <text:h text:style-name="Heading_20_3" text:outline-level="3">Windows</text:h>
      <text:p text:style-name="Text_20_body">Open Command Prompt or the VS Code terminal and run:</text:p>
      <text:p text:style-name="P2"><text:soft-page-break/><text:span text:style-name="Source_20_Text">pip install jupyter</text:span></text:p>
      <text:h text:style-name="Heading_20_3" text:outline-level="3">macOS</text:h>
      <text:p text:style-name="P2"><text:span text:style-name="Source_20_Text">pip3 install jupyter</text:span></text:p>
      <text:h text:style-name="Heading_20_3" text:outline-level="3">Linux</text:h>
      <text:p text:style-name="P2"><text:span text:style-name="Source_20_Text">pip3 install jupyter</text:span></text:p>
      <text:p text:style-name="Quotations">If you get a permissions error on Linux, add <text:span text:style-name="Source_20_Text">--user</text:span> at the end: <text:span text:style-name="Source_20_Text">pip3 install jupyter --user</text:span></text:p>
      <text:h text:style-name="Heading_20_2" text:outline-level="2">Step 3 — Create Your First Notebook</text:h>
      <text:list text:style-name="L10">
        <text:list-item>
          <text:p text:style-name="P21">Open VS Code </text:p>
        </text:list-item>
        <text:list-item>
          <text:p text:style-name="P21">Press <text:span text:style-name="Source_20_Text">Ctrl+Shift+P</text:span> (or <text:span text:style-name="Source_20_Text">Cmd+Shift+P</text:span> on Mac) </text:p>
        </text:list-item>
        <text:list-item>
          <text:p text:style-name="P21">Type <text:span text:style-name="Strong_20_Emphasis">"Create: New Jupyter Notebook"</text:span> and hit Enter </text:p>
        </text:list-item>
        <text:list-item>
          <text:p text:style-name="P20">A new <text:span text:style-name="Source_20_Text">.ipynb</text:span> file opens — save it with <text:span text:style-name="Source_20_Text">Ctrl+S</text:span> and give it a name like <text:span text:style-name="Source_20_Text">first_notebook.ipynb</text:span> </text:p>
        </text:list-item>
      </text:list>
      <text:h text:style-name="Heading_20_2" text:outline-level="2">Step 4 — Select a Kernel</text:h>
      <text:p text:style-name="Text_20_body">Before doing this step, it helps to understand what the three pieces are and how they relate:</text:p>
      <text:list text:style-name="L12">
        <text:list-item>
          <text:p text:style-name="P24"><text:span text:style-name="Strong_20_Emphasis">The Notebook</text:span> — this is just the <text:span text:style-name="Source_20_Text">.ipynb</text:span> file open in VS Code. It's only a document — it holds your code cells and displays output, but it cannot run anything on its own. Think of it as a word document that happens to contain code.</text:p>
        </text:list-item>
        <text:list-item>
          <text:p text:style-name="P24"><text:span text:style-name="Strong_20_Emphasis">ipykernel</text:span> — this is the middleman process that runs in the background. When you press Shift+Enter on a cell, the notebook doesn't run the code itself — it sends the code to <text:span text:style-name="Source_20_Text">ipykernel</text:span>. It's the communication bridge.</text:p>
        </text:list-item>
        <text:list-item>
          <text:p text:style-name="P24"><text:span text:style-name="Strong_20_Emphasis">The Python Interpreter</text:span> — this is the actual Python installation on your computer that executes the code. It receives the code from <text:span text:style-name="Source_20_Text">ipykernel</text:span>, runs it, and sends the result back through <text:span text:style-name="Source_20_Text">ipykernel</text:span> to be displayed in the notebook.</text:p>
        </text:list-item>
      </text:list>
      <text:p text:style-name="Text_20_body">So the full chain every time you run a cell is:</text:p>
      <text:p text:style-name="Preformatted_20_Text"><text:span text:style-name="Source_20_Text">You press Shift+Enter</text:span></text:p>
      <text:p text:style-name="Preformatted_20_Text"><text:span text:style-name="Source_20_Text"><text:s text:c="8"/>↓</text:span></text:p>
      <text:p text:style-name="Preformatted_20_Text"><text:span text:style-name="Source_20_Text">Notebook sends code to ipykernel</text:span></text:p>
      <text:p text:style-name="Preformatted_20_Text"><text:span text:style-name="Source_20_Text"><text:s text:c="8"/>↓</text:span></text:p>
      <text:p text:style-name="Preformatted_20_Text"><text:span text:style-name="Source_20_Text">ipykernel forwards it to the Python Interpreter</text:span></text:p>
      <text:p text:style-name="Preformatted_20_Text"><text:span text:style-name="Source_20_Text"><text:s text:c="8"/>↓</text:span></text:p>
      <text:p text:style-name="Preformatted_20_Text"><text:span text:style-name="Source_20_Text">Python runs it and sends result back to ipykernel</text:span></text:p>
      <text:p text:style-name="Preformatted_20_Text"><text:span text:style-name="Source_20_Text"><text:s text:c="8"/>↓</text:span></text:p>
      <text:p text:style-name="Preformatted_20_Text"><text:span text:style-name="Source_20_Text">ipykernel sends result back to the Notebook</text:span></text:p>
      <text:p text:style-name="Preformatted_20_Text"><text:span text:style-name="Source_20_Text"><text:s text:c="8"/>↓</text:span></text:p>
      <text:p text:style-name="P2"><text:span text:style-name="Source_20_Text">Output appears below your cell</text:span></text:p>
      <text:p text:style-name="Text_20_body"><text:soft-page-break/>Now, when you open a notebook, VS Code will show a <text:span text:style-name="Strong_20_Emphasis">"Select Kernel"</text:span> prompt in the top-right corner. This is asking you: which Python installation should <text:span text:style-name="Source_20_Text">ipykernel</text:span> connect to? Click it and choose your Python version (the same one you installed in Part 1).</text:p>
      <text:p text:style-name="Text_20_body">If you don't see a kernel or get an error, it means <text:span text:style-name="Source_20_Text">ipykernel</text:span> is not installed in your Python environment yet. Fix it by running this in your terminal:</text:p>
      <text:p text:style-name="P2"><text:span text:style-name="Source_20_Text">pip install ipykernel</text:span></text:p>
      <text:p text:style-name="Text_20_body">Then restart VS Code and try selecting the kernel again. Once it's connected you'll see the Python version name sitting in the top-right corner of the notebook, which means all three pieces — notebook, ipykernel, and Python interpreter — are linked and ready.</text:p>
      <text:p text:style-name="Text_20_body"/>
      <text:h text:style-name="Heading_20_2" text:outline-level="2">Step 5 — Understanding the Notebook Interface</text:h>
      <text:p text:style-name="Text_20_body">Once your notebook is open you'll see:</text:p>
      <text:list text:style-name="L11">
        <text:list-item>
          <text:p text:style-name="P23"><text:span text:style-name="Strong_20_Emphasis">Cells</text:span> — boxes where you write code </text:p>
        </text:list-item>
        <text:list-item>
          <text:p text:style-name="P23"><text:span text:style-name="Strong_20_Emphasis">+ Code</text:span> button at the top — adds a new code cell </text:p>
        </text:list-item>
        <text:list-item>
          <text:p text:style-name="P23"><text:span text:style-name="Strong_20_Emphasis">+ Markdown</text:span> button — adds a text cell (for notes and explanations, not code) </text:p>
        </text:list-item>
        <text:list-item>
          <text:p text:style-name="P23"><text:span text:style-name="Strong_20_Emphasis">Play button (▶)</text:span> on the left of each cell — runs just that cell </text:p>
        </text:list-item>
        <text:list-item>
          <text:p text:style-name="P22"><text:span text:style-name="Strong_20_Emphasis">Output</text:span> appears directly below the cell after you run it </text:p>
        </text:list-item>
      </text:list>
      <text:h text:style-name="Heading_20_2" text:outline-level="2">Step 6 — Write Your First Notebook Code</text:h>
      <text:p text:style-name="Text_20_body">Click into the first cell and type:</text:p>
      <text:p text:style-name="P2"><text:span text:style-name="Source_20_Text">print("Hello from Jupyter!")</text:span></text:p>
      <text:p text:style-name="Text_20_body">Press <text:span text:style-name="Strong_20_Emphasis">Shift+Enter</text:span> to run the cell and move to the next one. You'll see the output appear right below.</text:p>
      <text:p text:style-name="Text_20_body">Add a second cell:</text:p>
      <text:p text:style-name="Preformatted_20_Text"><text:span text:style-name="Source_20_Text">x = 10</text:span></text:p>
      <text:p text:style-name="Preformatted_20_Text"><text:span text:style-name="Source_20_Text">y = 20</text:span></text:p>
      <text:p text:style-name="P2"><text:span text:style-name="Source_20_Text">print(x + y)</text:span></text:p>
      <text:p text:style-name="Text_20_body">Press <text:span text:style-name="Strong_20_Emphasis">Shift+Enter</text:span> again. Output: <text:span text:style-name="Source_20_Text">30</text:span></text:p>
      <text:p text:style-name="Text_20_body">Each cell remembers the variables from previous cells — so <text:span text:style-name="Source_20_Text">x</text:span> and <text:span text:style-name="Source_20_Text">y</text:span> defined in cell 2 are available in cell 3.</text:p>
      <text:h text:style-name="Heading_20_2" text:outline-level="2">Step 7 — Install Common Data Science Packages (Optional but Recommended)</text:h>
      <text:p text:style-name="Text_20_body">If you plan to use notebooks for data work, install these now:</text:p>
      <text:h text:style-name="Heading_20_3" text:outline-level="3">Windows</text:h>
      <text:p text:style-name="P2"><text:span text:style-name="Source_20_Text">pip install numpy pandas matplotlib</text:span></text:p>
      <text:h text:style-name="Heading_20_3" text:outline-level="3"><text:soft-page-break/>macOS / Linux</text:h>
      <text:p text:style-name="P2"><text:span text:style-name="Source_20_Text">pip3 install numpy pandas matplotlib</text:span></text:p>
      <text:p text:style-name="Text_20_body">Then test it in a notebook cell:</text:p>
      <text:p text:style-name="Preformatted_20_Text"><text:span text:style-name="Source_20_Text">import matplotlib.pyplot as plt</text:span></text:p>
      <text:p text:style-name="Preformatted_20_Text"/>
      <text:p text:style-name="Preformatted_20_Text"><text:span text:style-name="Source_20_Text">plt.plot([1, 2, 3, 4], [10, 20, 25, 40])</text:span></text:p>
      <text:p text:style-name="Preformatted_20_Text"><text:span text:style-name="Source_20_Text">plt.title("My First Chart")</text:span></text:p>
      <text:p text:style-name="P2"><text:span text:style-name="Source_20_Text">plt.show()</text:span></text:p>
      <text:p text:style-name="Text_20_body">A chart will render directly inside the notebook below the cell.</text:p>
      <text:h text:style-name="Heading_20_2" text:outline-level="2">Quick Reference Summary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What</text:p>
            </table:table-cell>
            <table:table-cell table:style-name="Table1.A1" office:value-type="string">
              <text:p text:style-name="Table_20_Heading">Windows</text:p>
            </table:table-cell>
            <table:table-cell table:style-name="Table1.A1" office:value-type="string">
              <text:p text:style-name="Table_20_Heading">Mac</text:p>
            </table:table-cell>
            <table:table-cell table:style-name="Table1.A1" office:value-type="string">
              <text:p text:style-name="Table_20_Heading">Linux</text:p>
            </table:table-cell>
          </table:table-row>
        </table:table-header-rows>
        <table:table-row>
          <table:table-cell table:style-name="Table1.A1" office:value-type="string">
            <text:p text:style-name="Table_20_Contents">Install Python</text:p>
          </table:table-cell>
          <table:table-cell table:style-name="Table1.A1" office:value-type="string">
            <text:p text:style-name="Table_20_Contents">python.org installer</text:p>
          </table:table-cell>
          <table:table-cell table:style-name="Table1.A1" office:value-type="string">
            <text:p text:style-name="Table_20_Contents"><text:span text:style-name="Source_20_Text">brew install python</text:span></text:p>
          </table:table-cell>
          <table:table-cell table:style-name="Table1.A1" office:value-type="string">
            <text:p text:style-name="Table_20_Contents"><text:span text:style-name="Source_20_Text">sudo apt install python3</text:span></text:p>
          </table:table-cell>
        </table:table-row>
        <table:table-row>
          <table:table-cell table:style-name="Table1.A1" office:value-type="string">
            <text:p text:style-name="Table_20_Contents">Check version</text:p>
          </table:table-cell>
          <table:table-cell table:style-name="Table1.A1" office:value-type="string">
            <text:p text:style-name="Table_20_Contents"><text:span text:style-name="Source_20_Text">python --version</text:span></text:p>
          </table:table-cell>
          <table:table-cell table:style-name="Table1.A1" office:value-type="string">
            <text:p text:style-name="Table_20_Contents"><text:span text:style-name="Source_20_Text">python3 --version</text:span></text:p>
          </table:table-cell>
          <table:table-cell table:style-name="Table1.A1" office:value-type="string">
            <text:p text:style-name="Table_20_Contents"><text:span text:style-name="Source_20_Text">python3 --version</text:span></text:p>
          </table:table-cell>
        </table:table-row>
        <table:table-row>
          <table:table-cell table:style-name="Table1.A1" office:value-type="string">
            <text:p text:style-name="Table_20_Contents">Install package</text:p>
          </table:table-cell>
          <table:table-cell table:style-name="Table1.A1" office:value-type="string">
            <text:p text:style-name="Table_20_Contents"><text:span text:style-name="Source_20_Text">pip install X</text:span></text:p>
          </table:table-cell>
          <table:table-cell table:style-name="Table1.A1" office:value-type="string">
            <text:p text:style-name="Table_20_Contents"><text:span text:style-name="Source_20_Text">pip3 install X</text:span></text:p>
          </table:table-cell>
          <table:table-cell table:style-name="Table1.A1" office:value-type="string">
            <text:p text:style-name="Table_20_Contents"><text:span text:style-name="Source_20_Text">pip3 install X</text:span></text:p>
          </table:table-cell>
        </table:table-row>
        <table:table-row>
          <table:table-cell table:style-name="Table1.A1" office:value-type="string">
            <text:p text:style-name="Table_20_Contents">Install Jupyter</text:p>
          </table:table-cell>
          <table:table-cell table:style-name="Table1.A1" office:value-type="string">
            <text:p text:style-name="Table_20_Contents"><text:span text:style-name="Source_20_Text">pip install jupyter</text:span></text:p>
          </table:table-cell>
          <table:table-cell table:style-name="Table1.A1" office:value-type="string">
            <text:p text:style-name="Table_20_Contents"><text:span text:style-name="Source_20_Text">pip3 install jupyter</text:span></text:p>
          </table:table-cell>
          <table:table-cell table:style-name="Table1.A1" office:value-type="string">
            <text:p text:style-name="Table_20_Contents"><text:span text:style-name="Source_20_Text">pip3 install jupyter</text:span></text:p>
          </table:table-cell>
        </table:table-row>
        <table:table-row>
          <table:table-cell table:style-name="Table1.A1" office:value-type="string">
            <text:p text:style-name="Table_20_Contents">Run <text:span text:style-name="Source_20_Text">.py</text:span> file</text:p>
          </table:table-cell>
          <table:table-cell table:style-name="Table1.A1" office:value-type="string">
            <text:p text:style-name="Table_20_Contents">right-click → Run in Terminal</text:p>
          </table:table-cell>
          <table:table-cell table:style-name="Table1.A1" office:value-type="string">
            <text:p text:style-name="Table_20_Contents">same</text:p>
          </table:table-cell>
          <table:table-cell table:style-name="Table1.A1" office:value-type="string">
            <text:p text:style-name="Table_20_Contents">same</text:p>
          </table:table-cell>
        </table:table-row>
        <table:table-row>
          <table:table-cell table:style-name="Table1.A1" office:value-type="string">
            <text:p text:style-name="Table_20_Contents">Run notebook cell</text:p>
          </table:table-cell>
          <table:table-cell table:style-name="Table1.A1" office:value-type="string">
            <text:p text:style-name="Table_20_Contents">Shift+Enter</text:p>
          </table:table-cell>
          <table:table-cell table:style-name="Table1.A1" office:value-type="string">
            <text:p text:style-name="Table_20_Contents">Shift+Enter</text:p>
          </table:table-cell>
          <table:table-cell table:style-name="Table1.A1" office:value-type="string">
            <text:p text:style-name="Table_20_Contents">Shift+Enter</text:p>
          </table:table-cell>
        </table:table-row>
      </table:table>
      <text:h text:style-name="Heading_20_2" text:outline-level="2">Shortcut Method — Let VS Code Do It For You</text:h>
      <text:p text:style-name="Text_20_body">Instead of manually creating a virtual environment and installing all the packages yourself through the terminal, VS Code can do the whole thing for you in a few clicks.</text:p>
      <text:list text:style-name="L13">
        <text:list-item>
          <text:p text:style-name="P26">Install the <text:span text:style-name="Strong_20_Emphasis">Jupyter extension</text:span> in VS Code (Step 1 covered this) </text:p>
        </text:list-item>
        <text:list-item>
          <text:p text:style-name="P26">Create a new <text:span text:style-name="Source_20_Text">.ipynb</text:span> file </text:p>
        </text:list-item>
        <text:list-item>
          <text:p text:style-name="P26">Click <text:span text:style-name="Strong_20_Emphasis">"Select Kernel"</text:span> in the top-right corner </text:p>
        </text:list-item>
        <text:list-item>
          <text:p text:style-name="P26">Click <text:span text:style-name="Strong_20_Emphasis">"Python Environments"</text:span> </text:p>
        </text:list-item>
        <text:list-item>
          <text:p text:style-name="P26">Click <text:span text:style-name="Strong_20_Emphasis">"Create Python Environment"</text:span> </text:p>
        </text:list-item>
        <text:list-item>
          <text:p text:style-name="P25">Click <text:span text:style-name="Strong_20_Emphasis">"Quick Create"</text:span> </text:p>
        </text:list-item>
      </text:list>
      <text:p text:style-name="Text_20_body">VS Code will automatically create a <text:span text:style-name="Source_20_Text">.venv</text:span> inside your project folder and install all the required Jupyter packages into it without you touching the terminal at all.</text:p>
      <text:p text:style-name="Text_20_body">This is the fastest way to get going, but it is worth knowing the manual method from the steps above — because if something goes wrong, or you are working on a project that already has a virtual environment, you will need to understand what is happening under the hood rather than relying on VS Code to handle it for you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9T15:06:41.499272538</meta:creation-date>
    <dc:date>2026-05-29T16:02:53.122284263</dc:date>
    <meta:editing-duration>PT56M11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7" meta:paragraph-count="209" meta:word-count="1716" meta:character-count="10197" meta:non-whitespace-character-count="8622"/>
  </office:meta>
</office:document-meta>
</file>