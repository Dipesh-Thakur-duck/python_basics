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c1133" officeooo:paragraph-rsid="001c1133"/>
    </style:style>
    <style:style style:name="P2" style:family="paragraph" style:parent-style-name="Heading_20_2">
      <style:text-properties officeooo:rsid="001c1133" officeooo:paragraph-rsid="001c1133"/>
    </style:style>
    <style:style style:name="P3" style:family="paragraph" style:parent-style-name="Text_20_body">
      <style:text-properties officeooo:rsid="001c1133" officeooo:paragraph-rsid="001c1133"/>
    </style:style>
    <style:style style:name="P4" style:family="paragraph" style:parent-style-name="Title">
      <style:text-properties officeooo:rsid="001c1133" officeooo:paragraph-rsid="001c1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ython Syntax</text:p>
      <text:h text:style-name="Heading_20_1" text:outline-level="1">Python Indentation</text:h>
      <text:p text:style-name="P3">Indentation refers to the spaces at the beginning of a code line.</text:p>
      <text:p text:style-name="P3">Where in other programming languages the indentation in code is for readability only, the indentation in Python is very important.</text:p>
      <text:p text:style-name="P3">Python uses indentation to indicate a block of code.</text:p>
      <text:h text:style-name="P1" text:outline-level="1">Python Variables</text:h>
      <text:p text:style-name="P3">In Python, a variable is is created when you assign a value to it. Python has no command for declaring a variable.</text:p>
      <text:h text:style-name="P1" text:outline-level="1">Comments</text:h>
      <text:p text:style-name="P3">Python has commenting capability for the purpose of in-code documentation. Comments start with a #, and Python will render the rest of the line as a comment.</text:p>
      <text:h text:style-name="P1" text:outline-level="1">Python Statements</text:h>
      <text:h text:style-name="P2" text:outline-level="2">Statements</text:h>
      <text:p text:style-name="P3">A computer program is a list of “instructions” to be “executed” by a computer. In a programming language, these programming instructions are called statements.</text:p>
      <text:h text:style-name="P2" text:outline-level="2">Semicolons (Optional, Rarely Used)</text:h>
      <text:p text:style-name="P3">Semicolons are optional in Python. You can write multiple statements on one line by separating them with ; but this is rarely used because it makes it hard to re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1:51:47.651961556</meta:creation-date>
    <dc:date>2026-05-30T12:00:06.185836696</dc:date>
    <meta:editing-duration>PT8M19S</meta:editing-duration>
    <meta:editing-cycles>1</meta:editing-cycles>
    <meta:document-statistic meta:table-count="0" meta:image-count="0" meta:object-count="0" meta:page-count="1" meta:paragraph-count="14" meta:word-count="158" meta:character-count="957" meta:non-whitespace-character-count="813"/>
    <meta:generator>LibreOffice/24.2.7.2$Linux_X86_64 LibreOffice_project/420$Build-2</meta:generator>
  </office:meta>
</office:document-meta>
</file>